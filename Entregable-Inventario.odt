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Diseño De Software</text:p>
      <text:p text:style-name="P13">Ingeniería de software</text:p>
      <text:p text:style-name="P14">IV Semestre</text:p>
      <text:p text:style-name="P15">Sofía Pérez Vanegas</text:p>
      <text:p text:style-name="P16">Juan Esteban Gallego Londoño</text:p>
      <text:p text:style-name="P17">Juan Miguel Cerón Ocamp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Normal">Inventario - Diseño de Software</text:p>
      <text:p text:style-name="Normal"><text:s/></text:p>
      <text:p text:style-name="Normal">Link Repositorio: https://github.com/sofip95/proyectoPatrones</text:p>
      <text:p text:style-name="Normal"/>
      <text:p text:style-name="Normal">PATRONES APLICADOS E INDICACIÓN DE CLASES</text:p>
      <text:p text:style-name="Normal"><text:s/></text:p>
      <text:p text:style-name="Normal">1. Repository</text:p>
      <text:p text:style-name="Normal">----------------------------</text:p>
      <text:p text:style-name="Normal">Clases: PersonaRepository.java, ProductoRepository.java</text:p>
      <text:p text:style-name="Normal">Función: Abstrae la lógica de acceso a datos, proporcionando una interfaz para realizar operaciones CRUD sobre las entidades Persona y Producto, facilitando la separación de la lógica de negocio y la persistencia.</text:p>
      <text:p text:style-name="Normal"><text:s/></text:p>
      <text:p text:style-name="Normal">2. Builder</text:p>
      <text:p text:style-name="Normal">----------------------------</text:p>
      <text:p text:style-name="Normal">Clases: PersonaBuilder.java, ProductoBuilder.java</text:p>
      <text:p text:style-name="Normal">Función: Facilita la construcción de objetos complejos (Persona y Producto) paso a paso, permitiendo crear instancias configuradas de manera flexible y legible.</text:p>
      <text:p text:style-name="Normal"><text:s/></text:p>
      <text:p text:style-name="Normal">3. Observer</text:p>
      <text:p text:style-name="Normal">----------------------------</text:p>
      <text:p text:style-name="Normal">Clases: PersonaObserver.java, PersonaService.java, VistaGestionEmpleado.java</text:p>
      <text:p text:style-name="Normal">Función: Permite que la vista (VistaGestionEmpleado) se registre como observadora del servicio (PersonaService) para recibir notificaciones y actualizar la interfaz cuando los datos de Persona cambian.</text:p>
      <text:p text:style-name="Normal"><text:s/></text:p>
      <text:p text:style-name="Normal">4. Strategy</text:p>
      <text:p text:style-name="Normal">----------------------------</text:p>
      <text:p text:style-name="Normal">Clases: SearchStrategy.java, SearchById.java, SearchByName.java, ProductoService.java, VistaGestionProducto.java</text:p>
      <text:p text:style-name="Normal">Función: Define una familia de algoritmos de búsqueda para productos, encapsulándolos y haciéndolos intercambiables, permitiendo cambiar la estrategia de búsqueda en tiempo de ejecución.</text:p>
      <text:p text:style-name="Normal"><text:s/></text:p>
      <text:p text:style-name="Normal">5. Decorator</text:p>
      <text:p text:style-name="Normal">----------------------------</text:p>
      <text:p text:style-name="Normal">Clases: ProductoDecorator.java, AseoDecorator.java, ComidaDecorator.java, ElectronicaDecorator.java, ProductoService.java</text:p>
      <text:p text:style-name="Normal">Función: Añade responsabilidades adicionales a los objetos Producto de forma dinámica según su categoría, sin modificar la clase base.</text:p>
      <text:p text:style-name="Normal"><text:s/></text:p>
      <text:p text:style-name="Normal">6. Singleton</text:p>
      <text:p text:style-name="Normal">----------------------------</text:p>
      <text:p text:style-name="Normal">Clases: DataConfig.java</text:p>
      <text:p text:style-name="Normal">Función: Garantiza que exista una única instancia de configuración de la base de datos durante la ejecución de la aplicación, proporcionando un punto de acceso global.</text:p>
      <text:p text:style-name="Normal"><text:s/></text:p>
      <text:p text:style-name="Normal">Este documento resume los patrones de diseño aplicados en el proyecto "Inventario" y su ubicación en el código fuente, facilitando la comprensión de la arquitectura y diseño del software.</text:p>
      <text:p text:style-name="Normal"/>
      <text:p text:style-name="Normal"/>
      <text:p text:style-name="Normal"/>
      <text:p text:style-name="Normal"/>
      <text:p text:style-name="Normal">DIAGRAMA DE CASOS DE USO<text:s/></text:p>
      <text:p text:style-name="Normal"/>
      <text:p text:style-name="Normal"><draw:frame draw:style-name="a0" draw:name="Imagen 749928764" text:anchor-type="as-char" svg:x="0in" svg:y="0in" svg:width="6.26042in" svg:height="1.8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DIAGRAMA DE CLASES<text:s/></text:p>
      <text:p text:style-name="Normal"/>
      <text:p text:style-name="Normal"><draw:frame draw:style-name="a1" draw:name="Imagen 1689181516" text:anchor-type="as-char" svg:x="0in" svg:y="0in" svg:width="6.26042in" svg:height="2.30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fia Perez</meta:initial-creator>
    <dc:creator>Sofia Perez</dc:creator>
    <meta:creation-date>2025-05-25T02:32:00Z</meta:creation-date>
    <dc:date>2025-05-25T02:32:00Z</dc:date>
    <meta:template xlink:href="Normal.dotm" xlink:type="simple"/>
    <meta:editing-cycles>1</meta:editing-cycles>
    <meta:editing-duration>PT0S</meta:editing-duration>
    <meta:document-statistic meta:page-count="1" meta:paragraph-count="4" meta:word-count="357" meta:character-count="2320" meta:row-count="16" meta:non-whitespace-character-count="1967"/>
  </office:meta>
</office:document-meta>
</file>